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eact, { useState } from "react";</text:p>
      <text:p text:style-name="Standard"/>
      <text:p text:style-name="Standard">function App() {</text:p>
      <text:p text:style-name="Standard"><text:s text:c="2"/>const [isSignup, setIsSignup] = useState(true);</text:p>
      <text:p text:style-name="Standard"><text:s text:c="2"/>const [isLoggedIn, setIsLoggedIn] = useState(false);</text:p>
      <text:p text:style-name="Standard"/>
      <text:p text:style-name="Standard"><text:s text:c="2"/>const [student, setStudent] = useState({</text:p>
      <text:p text:style-name="Standard"><text:s text:c="4"/>name: "",</text:p>
      <text:p text:style-name="Standard"><text:s text:c="4"/>rollNo: "",</text:p>
      <text:p text:style-name="Standard"><text:s text:c="4"/>course: "",</text:p>
      <text:p text:style-name="Standard"><text:s text:c="4"/>email: "",</text:p>
      <text:p text:style-name="Standard"><text:s text:c="4"/>password: "",</text:p>
      <text:p text:style-name="Standard"><text:s text:c="2"/>});</text:p>
      <text:p text:style-name="Standard"/>
      <text:p text:style-name="Standard"><text:s text:c="2"/>const [loginData, setLoginData] = useState({</text:p>
      <text:p text:style-name="Standard"><text:s text:c="4"/>email: "",</text:p>
      <text:p text:style-name="Standard"><text:s text:c="4"/>password: "",</text:p>
      <text:p text:style-name="Standard"><text:s text:c="2"/>});</text:p>
      <text:p text:style-name="Standard"/>
      <text:p text:style-name="Standard"><text:s text:c="2"/>const handleSignup = (e) =&gt; {</text:p>
      <text:p text:style-name="Standard"><text:s text:c="4"/>e.preventDefault();</text:p>
      <text:p text:style-name="Standard"><text:s text:c="4"/>alert("Signup Successful");</text:p>
      <text:p text:style-name="Standard"><text:s text:c="4"/>setIsSignup(false);</text:p>
      <text:p text:style-name="Standard"><text:s text:c="2"/>};</text:p>
      <text:p text:style-name="Standard"/>
      <text:p text:style-name="Standard"><text:s text:c="2"/>const handleLogin = (e) =&gt; {</text:p>
      <text:p text:style-name="Standard"><text:s text:c="4"/>e.preventDefault();</text:p>
      <text:p text:style-name="Standard"/>
      <text:p text:style-name="Standard"><text:s text:c="4"/>if (</text:p>
      <text:p text:style-name="Standard"><text:s text:c="6"/>loginData.email === student.email &amp;&amp;</text:p>
      <text:p text:style-name="Standard"><text:s text:c="6"/>loginData.password === student.password</text:p>
      <text:p text:style-name="Standard"><text:s text:c="4"/>) {</text:p>
      <text:p text:style-name="Standard"><text:s text:c="6"/>setIsLoggedIn(true);</text:p>
      <text:p text:style-name="Standard"><text:s text:c="4"/>} else {</text:p>
      <text:p text:style-name="Standard"><text:s text:c="6"/>alert("Invalid Credentials");</text:p>
      <text:p text:style-name="Standard"><text:s text:c="4"/>}</text:p>
      <text:p text:style-name="Standard"><text:s text:c="2"/>};</text:p>
      <text:p text:style-name="Standard"/>
      <text:p text:style-name="Standard"><text:s text:c="2"/>const handleLogout = () =&gt; {</text:p>
      <text:p text:style-name="Standard"><text:s text:c="4"/>setIsLoggedIn(false);</text:p>
      <text:p text:style-name="Standard"><text:s text:c="4"/>setIsSignup(false);</text:p>
      <text:p text:style-name="Standard"><text:s text:c="2"/>};</text:p>
      <text:p text:style-name="Standard"/>
      <text:p text:style-name="Standard"><text:s text:c="2"/>return (</text:p>
      <text:p text:style-name="Standard"><text:s text:c="4"/>&lt;div style={styles.container}&gt;</text:p>
      <text:p text:style-name="Standard"><text:s text:c="6"/>&lt;div style={styles.card}&gt;</text:p>
      <text:p text:style-name="Standard"><text:s text:c="8"/>{!isLoggedIn ? (</text:p>
      <text:p text:style-name="Standard"><text:s text:c="10"/>isSignup ? (</text:p>
      <text:p text:style-name="Standard"><text:s text:c="12"/>&lt;&gt;</text:p>
      <text:p text:style-name="Standard"><text:s text:c="14"/>&lt;h1 style={styles.title}&gt;Student Signup&lt;/h1&gt;</text:p>
      <text:p text:style-name="Standard"/>
      <text:p text:style-name="Standard"><text:s text:c="14"/>&lt;form onSubmit={handleSignup}&gt;</text:p>
      <text:p text:style-name="Standard"><text:soft-page-break/><text:s text:c="16"/>&lt;input</text:p>
      <text:p text:style-name="Standard"><text:s text:c="18"/>type="text"</text:p>
      <text:p text:style-name="Standard"><text:s text:c="18"/>placeholder="Name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name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text"</text:p>
      <text:p text:style-name="Standard"><text:s text:c="18"/>placeholder="Roll No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rollNo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text"</text:p>
      <text:p text:style-name="Standard"><text:s text:c="18"/>placeholder="Course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course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email"</text:p>
      <text:p text:style-name="Standard"><text:s text:c="18"/>placeholder="Email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email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password"</text:p>
      <text:p text:style-name="Standard"><text:s text:c="18"/>placeholder="Password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password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button type="submit" style={styles.button}&gt;</text:p>
      <text:p text:style-name="Standard"><text:s text:c="18"/>Signup</text:p>
      <text:p text:style-name="Standard"><text:soft-page-break/><text:s text:c="16"/>&lt;/button&gt;</text:p>
      <text:p text:style-name="Standard"><text:s text:c="14"/>&lt;/form&gt;</text:p>
      <text:p text:style-name="Standard"/>
      <text:p text:style-name="Standard"><text:s text:c="14"/>&lt;p style={styles.text}&gt;</text:p>
      <text:p text:style-name="Standard"><text:s text:c="16"/>Already have an account?{" "}</text:p>
      <text:p text:style-name="Standard"><text:s text:c="16"/>&lt;span</text:p>
      <text:p text:style-name="Standard"><text:s text:c="18"/>style={styles.link}</text:p>
      <text:p text:style-name="Standard"><text:s text:c="18"/>onClick={() =&gt; setIsSignup(false)}</text:p>
      <text:p text:style-name="Standard"><text:s text:c="16"/>&gt;</text:p>
      <text:p text:style-name="Standard"><text:s text:c="18"/>Login</text:p>
      <text:p text:style-name="Standard"><text:s text:c="16"/>&lt;/span&gt;</text:p>
      <text:p text:style-name="Standard"><text:s text:c="14"/>&lt;/p&gt;</text:p>
      <text:p text:style-name="Standard"><text:s text:c="12"/>&lt;/&gt;</text:p>
      <text:p text:style-name="Standard"><text:s text:c="10"/>) : (</text:p>
      <text:p text:style-name="Standard"><text:s text:c="12"/>&lt;&gt;</text:p>
      <text:p text:style-name="Standard"><text:s text:c="14"/>&lt;h1 style={styles.title}&gt;Student Login&lt;/h1&gt;</text:p>
      <text:p text:style-name="Standard"/>
      <text:p text:style-name="Standard"><text:s text:c="14"/>&lt;form onSubmit={handleLogin}&gt;</text:p>
      <text:p text:style-name="Standard"><text:s text:c="16"/>&lt;input</text:p>
      <text:p text:style-name="Standard"><text:s text:c="18"/>type="email"</text:p>
      <text:p text:style-name="Standard"><text:s text:c="18"/>placeholder="Email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LoginData({</text:p>
      <text:p text:style-name="Standard"><text:s text:c="22"/>...loginData,</text:p>
      <text:p text:style-name="Standard"><text:s text:c="22"/>email: e.target.value,</text:p>
      <text:p text:style-name="Standard"><text:s text:c="20"/>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password"</text:p>
      <text:p text:style-name="Standard"><text:s text:c="18"/>placeholder="Password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LoginData({</text:p>
      <text:p text:style-name="Standard"><text:s text:c="22"/>...loginData,</text:p>
      <text:p text:style-name="Standard"><text:s text:c="22"/>password: e.target.value,</text:p>
      <text:p text:style-name="Standard"><text:s text:c="20"/>})</text:p>
      <text:p text:style-name="Standard"><text:s text:c="18"/>}</text:p>
      <text:p text:style-name="Standard"><text:s text:c="16"/>/&gt;</text:p>
      <text:p text:style-name="Standard"/>
      <text:p text:style-name="Standard"><text:s text:c="16"/>&lt;button type="submit" style={styles.button}&gt;</text:p>
      <text:p text:style-name="Standard"><text:s text:c="18"/>Login</text:p>
      <text:p text:style-name="Standard"><text:s text:c="16"/>&lt;/button&gt;</text:p>
      <text:p text:style-name="Standard"><text:s text:c="14"/>&lt;/form&gt;</text:p>
      <text:p text:style-name="Standard"/>
      <text:p text:style-name="Standard"><text:s text:c="14"/>&lt;p style={styles.text}&gt;</text:p>
      <text:p text:style-name="Standard"><text:s text:c="16"/>Don't have an account?{" "}</text:p>
      <text:p text:style-name="Standard"><text:s text:c="16"/>&lt;span</text:p>
      <text:p text:style-name="Standard"><text:soft-page-break/><text:s text:c="18"/>style={styles.link}</text:p>
      <text:p text:style-name="Standard"><text:s text:c="18"/>onClick={() =&gt; setIsSignup(true)}</text:p>
      <text:p text:style-name="Standard"><text:s text:c="16"/>&gt;</text:p>
      <text:p text:style-name="Standard"><text:s text:c="18"/>Signup</text:p>
      <text:p text:style-name="Standard"><text:s text:c="16"/>&lt;/span&gt;</text:p>
      <text:p text:style-name="Standard"><text:s text:c="14"/>&lt;/p&gt;</text:p>
      <text:p text:style-name="Standard"><text:s text:c="12"/>&lt;/&gt;</text:p>
      <text:p text:style-name="Standard"><text:s text:c="10"/>)</text:p>
      <text:p text:style-name="Standard"><text:s text:c="8"/>) : (</text:p>
      <text:p text:style-name="Standard"><text:s text:c="10"/>&lt;&gt;</text:p>
      <text:p text:style-name="Standard"><text:s text:c="12"/>&lt;h1 style={styles.title}&gt;Student Dashboard&lt;/h1&gt;</text:p>
      <text:p text:style-name="Standard"/>
      <text:p text:style-name="Standard"><text:s text:c="12"/>&lt;h2 style={styles.welcome}&gt;</text:p>
      <text:p text:style-name="Standard"><text:s text:c="14"/>Welcome {student.name}</text:p>
      <text:p text:style-name="Standard"><text:s text:c="12"/>&lt;/h2&gt;</text:p>
      <text:p text:style-name="Standard"/>
      <text:p text:style-name="Standard"><text:s text:c="12"/>&lt;p style={styles.info}&gt;</text:p>
      <text:p text:style-name="Standard"><text:s text:c="14"/>&lt;strong&gt;Roll No:&lt;/strong&gt; {student.rollNo}</text:p>
      <text:p text:style-name="Standard"><text:s text:c="12"/>&lt;/p&gt;</text:p>
      <text:p text:style-name="Standard"/>
      <text:p text:style-name="Standard"><text:s text:c="12"/>&lt;p style={styles.info}&gt;</text:p>
      <text:p text:style-name="Standard"><text:s text:c="14"/>&lt;strong&gt;Course:&lt;/strong&gt; {student.course}</text:p>
      <text:p text:style-name="Standard"><text:s text:c="12"/>&lt;/p&gt;</text:p>
      <text:p text:style-name="Standard"/>
      <text:p text:style-name="Standard"><text:s text:c="12"/>&lt;p style={styles.info}&gt;</text:p>
      <text:p text:style-name="Standard"><text:s text:c="14"/>&lt;strong&gt;Email:&lt;/strong&gt; {student.email}</text:p>
      <text:p text:style-name="Standard"><text:s text:c="12"/>&lt;/p&gt;</text:p>
      <text:p text:style-name="Standard"/>
      <text:p text:style-name="Standard"><text:s text:c="12"/>&lt;button style={styles.button} onClick={handleLogout}&gt;</text:p>
      <text:p text:style-name="Standard"><text:s text:c="14"/>Logout</text:p>
      <text:p text:style-name="Standard"><text:s text:c="12"/>&lt;/button&gt;</text:p>
      <text:p text:style-name="Standard"><text:s text:c="10"/>&lt;/&gt;</text:p>
      <text:p text:style-name="Standard"><text:s text:c="8"/>)}</text:p>
      <text:p text:style-name="Standard"><text:s text:c="6"/>&lt;/div&gt;</text:p>
      <text:p text:style-name="Standard"><text:s text:c="4"/>&lt;/div&gt;</text:p>
      <text:p text:style-name="Standard"><text:s text:c="2"/>);</text:p>
      <text:p text:style-name="Standard">}</text:p>
      <text:p text:style-name="Standard"/>
      <text:p text:style-name="Standard">const styles = {</text:p>
      <text:p text:style-name="Standard"><text:s text:c="2"/>container: {</text:p>
      <text:p text:style-name="Standard"><text:s text:c="4"/>minHeight: "100vh",</text:p>
      <text:p text:style-name="Standard"><text:s text:c="4"/>display: "flex",</text:p>
      <text:p text:style-name="Standard"><text:s text:c="4"/>justifyContent: "center",</text:p>
      <text:p text:style-name="Standard"><text:s text:c="4"/>alignItems: "center",</text:p>
      <text:p text:style-name="Standard"><text:s text:c="4"/>backgroundColor: "#eef3ff",</text:p>
      <text:p text:style-name="Standard"><text:s text:c="2"/>},</text:p>
      <text:p text:style-name="Standard"/>
      <text:p text:style-name="Standard"><text:s text:c="2"/>card: {</text:p>
      <text:p text:style-name="Standard"><text:s text:c="4"/>width: "450px",</text:p>
      <text:p text:style-name="Standard"><text:s text:c="4"/>background: "#fff",</text:p>
      <text:p text:style-name="Standard"><text:s text:c="4"/>padding: "35px",</text:p>
      <text:p text:style-name="Standard"><text:s text:c="4"/>borderRadius: "15px",</text:p>
      <text:p text:style-name="Standard"><text:soft-page-break/><text:s text:c="4"/>boxShadow: "0 4px 15px rgba(0,0,0,0.15)",</text:p>
      <text:p text:style-name="Standard"><text:s text:c="2"/>},</text:p>
      <text:p text:style-name="Standard"/>
      <text:p text:style-name="Standard"><text:s text:c="2"/>title: {</text:p>
      <text:p text:style-name="Standard"><text:s text:c="4"/>textAlign: "center",</text:p>
      <text:p text:style-name="Standard"><text:s text:c="4"/>marginBottom: "25px",</text:p>
      <text:p text:style-name="Standard"><text:s text:c="4"/>fontSize: "40px",</text:p>
      <text:p text:style-name="Standard"><text:s text:c="2"/>},</text:p>
      <text:p text:style-name="Standard"/>
      <text:p text:style-name="Standard"><text:s text:c="2"/>input: {</text:p>
      <text:p text:style-name="Standard"><text:s text:c="4"/>width: "100%",</text:p>
      <text:p text:style-name="Standard"><text:s text:c="4"/>padding: "12px",</text:p>
      <text:p text:style-name="Standard"><text:s text:c="4"/>marginBottom: "15px",</text:p>
      <text:p text:style-name="Standard"><text:s text:c="4"/>border: "1px solid #ccc",</text:p>
      <text:p text:style-name="Standard"><text:s text:c="4"/>borderRadius: "5px",</text:p>
      <text:p text:style-name="Standard"><text:s text:c="4"/>boxSizing: "border-box",</text:p>
      <text:p text:style-name="Standard"><text:s text:c="2"/>},</text:p>
      <text:p text:style-name="Standard"/>
      <text:p text:style-name="Standard"><text:s text:c="2"/>button: {</text:p>
      <text:p text:style-name="Standard"><text:s text:c="4"/>width: "100%",</text:p>
      <text:p text:style-name="Standard"><text:s text:c="4"/>padding: "12px",</text:p>
      <text:p text:style-name="Standard"><text:s text:c="4"/>backgroundColor: "#1d4ed8",</text:p>
      <text:p text:style-name="Standard"><text:s text:c="4"/>color: "#fff",</text:p>
      <text:p text:style-name="Standard"><text:s text:c="4"/>border: "none",</text:p>
      <text:p text:style-name="Standard"><text:s text:c="4"/>borderRadius: "5px",</text:p>
      <text:p text:style-name="Standard"><text:s text:c="4"/>cursor: "pointer",</text:p>
      <text:p text:style-name="Standard"><text:s text:c="4"/>fontSize: "16px",</text:p>
      <text:p text:style-name="Standard"><text:s text:c="2"/>},</text:p>
      <text:p text:style-name="Standard"/>
      <text:p text:style-name="Standard"><text:s text:c="2"/>text: {</text:p>
      <text:p text:style-name="Standard"><text:s text:c="4"/>textAlign: "center",</text:p>
      <text:p text:style-name="Standard"><text:s text:c="4"/>marginTop: "15px",</text:p>
      <text:p text:style-name="Standard"><text:s text:c="2"/>},</text:p>
      <text:p text:style-name="Standard"/>
      <text:p text:style-name="Standard"><text:s text:c="2"/>link: {</text:p>
      <text:p text:style-name="Standard"><text:s text:c="4"/>color: "#1d4ed8",</text:p>
      <text:p text:style-name="Standard"><text:s text:c="4"/>cursor: "pointer",</text:p>
      <text:p text:style-name="Standard"><text:s text:c="4"/>fontWeight: "bold",</text:p>
      <text:p text:style-name="Standard"><text:s text:c="2"/>},</text:p>
      <text:p text:style-name="Standard"/>
      <text:p text:style-name="Standard"><text:s text:c="2"/>welcome: {</text:p>
      <text:p text:style-name="Standard"><text:s text:c="4"/>textAlign: "center",</text:p>
      <text:p text:style-name="Standard"><text:s text:c="4"/>marginBottom: "20px",</text:p>
      <text:p text:style-name="Standard"><text:s text:c="2"/>},</text:p>
      <text:p text:style-name="Standard"/>
      <text:p text:style-name="Standard"><text:s text:c="2"/>info: {</text:p>
      <text:p text:style-name="Standard"><text:s text:c="4"/>textAlign: "center",</text:p>
      <text:p text:style-name="Standard"><text:s text:c="4"/>fontSize: "18px",</text:p>
      <text:p text:style-name="Standard"><text:s text:c="4"/>margin: "12px 0",</text:p>
      <text:p text:style-name="Standard"><text:s text:c="2"/>},</text:p>
      <text:p text:style-name="Standard">};</text:p>
      <text:p text:style-name="Standard"/>
      <text:p text:style-name="Standard"><text:soft-page-break/>export default App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2T11:44:42.141009846</meta:creation-date>
    <dc:date>2026-06-22T11:45:25.069242853</dc:date>
    <meta:editing-duration>PT4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6" meta:paragraph-count="227" meta:word-count="419" meta:character-count="5893" meta:non-whitespace-character-count="3329"/>
  </office:meta>
</office:document-meta>
</file>